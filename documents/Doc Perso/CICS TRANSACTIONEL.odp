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8">
      <style:graphic-properties draw:fill="none" draw:stroke="non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9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430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CICS TRANSACTIONEL</text:span><text:span text:style-name="a382" text:class-names=""/></text:p>
          </draw:text-box>
          <svg:title/>
          <svg:desc/>
        </draw:frame>
        <draw:frame draw:id="id64" presentation:style-name="a388" draw:name="Sous-titre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Pseudo conversationnel</text:span><text:span text:style-name="a386" text:class-names=""/></text:p>
          </draw:text-box>
          <svg:title/>
          <svg:desc/>
        </draw:frame>
      </draw:page>
      <draw:page draw:name="Slide9" draw:style-name="a389" draw:master-page-name="Master1-Layout2-obj-Titre-et-contenu" presentation:presentation-page-layout-name="Master1-PPL2" draw:id="Slide-264">
        <draw:frame draw:id="id65" presentation:style-name="a393" draw:name="Titre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0" text:class-names="">DANS CICS : ajouter les 3 objets</text:span><text:span text:style-name="a391" text:class-names=""/></text:p>
          </draw:text-box>
          <svg:title/>
          <svg:desc/>
        </draw:frame>
        <draw:frame draw:id="id66" presentation:style-name="a431" draw:name="Espace réservé du contenu 2" svg:x="0.91667in" svg:y="1.99653in" svg:width="11.5in" svg:height="4.7586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Faire :</text:span></text:p>
              </text:list-item>
            </text:list>
            <text:list text:style-name="a401">
              <text:list-item>
                <text:p text:style-name="a400" text:class-names="" text:cond-style-name=""><text:span text:style-name="a397" text:class-names="">CEDA DEF MAP : on ajout le<text:s text:c="1"/></text:span><text:span text:style-name="a398" text:class-names="">map</text:span><text:span text:style-name="a399" text:class-names=""><text:s text:c="1"/>et le group</text:span></text:p>
              </text:list-item>
            </text:list>
            <text:list text:style-name="a411">
              <text:list-item>
                <text:p text:style-name="a410" text:class-names="" text:cond-style-name=""><text:span text:style-name="a402" text:class-names="">- CEDA INS MAP : on ajout le<text:s text:c="1"/></text:span><text:span text:style-name="a403" text:class-names="">map</text:span><text:span text:style-name="a404" text:class-names=""><text:s text:c="1"/>e</text:span><text:span text:style-name="a405" text:class-names="">t le</text:span><text:span text:style-name="a406" text:class-names=""><text:s text:c="1"/></text:span><text:span text:style-name="a407" text:class-names="">grou</text:span><text:span text:style-name="a408" text:class-names="">p</text:span><text:span text:style-name="a409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2" text:class-names="">- CEDA DEF TRANS : on ajout la transaction</text:span><text:span text:style-name="a413" text:class-names="">, program<text:s text:c="1"/></text:span><text:span text:style-name="a414" text:class-names="">et group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- CEDA INS TRANS : on ajout transaction et group</text:span></text:p>
              </text:list-item>
            </text:list>
            <text:list text:style-name="a424">
              <text:list-item>
                <text:p text:style-name="a423" text:class-names="" text:cond-style-name=""><text:span text:style-name="a420" text:class-names="">- CEDA DEF PROGRAM : on ajout program, group et<text:s text:c="1"/></text:span><text:span text:style-name="a421" text:class-names="">language</text:span><text:span text:style-name="a422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- CEDA INS PROGRAM : on ajout program et group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</draw:text-box>
          <svg:title/>
          <svg:desc/>
        </draw:frame>
      </draw:page>
      <draw:page draw:name="Slide4" draw:style-name="a432" draw:master-page-name="Master1-Layout2-obj-Titre-et-contenu" presentation:presentation-page-layout-name="Master1-PPL2" draw:id="Slide-259">
        <draw:frame draw:id="id67" presentation:style-name="a440" draw:name="Titre 1" svg:x="0.84524in" svg:y="1.33808in" svg:width="11.5in" svg:height="1.44965in" presentation:class="title" presentation:placeholder="false">
          <draw:text-box>
            <text:p text:style-name="a439" text:class-names="" text:cond-style-name=""><text:span text:style-name="a433" text:class-names="">À chaque modification on de la<text:s text:c="1"/></text:span><text:span text:style-name="a434" text:class-names="">map</text:span><text:span text:style-name="a435" text:class-names=""><text:s text:c="1"/>ou du<text:s text:c="1"/></text:span><text:span text:style-name="a436" text:class-names="">pgm</text:span><text:span text:style-name="a437" text:class-names=""><text:s text:c="1"/>on initialise avec « I » ici</text:span><text:span text:style-name="a438" text:class-names=""/></text:p>
          </draw:text-box>
          <svg:title/>
          <svg:desc/>
        </draw:frame>
        <draw:frame draw:id="id68" presentation:style-name="a441" draw:name="Espace réservé du contenu 4" svg:x="0.91667in" svg:y="3.75415in" svg:width="11.5in" svg:height="1.24344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</draw:page>
      <draw:page draw:name="Slide5" draw:style-name="a442" draw:master-page-name="Master1-Layout2-obj-Titre-et-contenu" presentation:presentation-page-layout-name="Master1-PPL2" draw:id="Slide-260">
        <draw:frame draw:id="id69" presentation:style-name="a452" draw:name="Titre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3" text:class-names="">Au</text:span><text:span text:style-name="a444" text:class-names=""><text:s text:c="1"/></text:span><text:span text:style-name="a445" text:class-names="">cas</text:span><text:span text:style-name="a446" text:class-names=""><text:s text:c="1"/></text:span><text:span text:style-name="a447" text:class-names="">où</text:span><text:span text:style-name="a448" text:class-names=""><text:s text:c="1"/></text:span><text:span text:style-name="a449" text:class-names="">le groupe ne s’ajoute pas !</text:span><text:span text:style-name="a450" text:class-names=""/></text:p>
          </draw:text-box>
          <svg:title/>
          <svg:desc/>
        </draw:frame>
        <draw:frame draw:id="id70" presentation:style-name="a453" draw:name="Espace réservé du contenu 4" svg:x="1.22396in" svg:y="2.62066in" svg:width="10.88542in" svg:height="3.51042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</draw:page>
      <draw:page draw:name="Slide8" draw:style-name="a454" draw:master-page-name="Master1-Layout2-obj-Titre-et-contenu" presentation:presentation-page-layout-name="Master1-PPL2" draw:id="Slide-263">
        <draw:frame draw:id="id71" presentation:style-name="a467" draw:name="Titre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55" text:class-names="">Modification des procédures de</text:span><text:span text:style-name="a456" text:class-names=""><text:s text:c="1"/></text:span><text:span text:style-name="a457" text:class-names="">la</text:span><text:span text:style-name="a458" text:class-names=""><text:s text:c="1"/></text:span><text:span text:style-name="a459" text:class-names="">library</text:span><text:span text:style-name="a460" text:class-names=""><text:s text:c="1"/></text:span><text:span text:style-name="a461" text:class-names="">en</text:span><text:span text:style-name="a462" text:class-names=""><text:s text:c="1"/></text:span><text:span text:style-name="a463" text:class-names="">question</text:span><text:span text:style-name="a464" text:class-names=""><text:s text:c="1"/></text:span><text:span text:style-name="a465" text:class-names=""/></text:p>
          </draw:text-box>
          <svg:title/>
          <svg:desc/>
        </draw:frame>
        <draw:frame draw:id="id72" presentation:style-name="a468" draw:name="Espace réservé du contenu 4" svg:x="0.91667in" svg:y="3.84759in" svg:width="11.5in" svg:height="1.05656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  <draw:frame draw:id="id73" draw:style-name="a476" draw:name="ZoneTexte 5" svg:x="1.02041in" svg:y="2.33673in" svg:width="11.72449in" svg:height="0.40391in">
          <draw:text-box>
            <text:p text:style-name="a475" text:class-names="" text:cond-style-name=""><text:span text:style-name="a469" text:class-names="">On ajout dans<text:s text:c="1"/></text:span><text:span text:style-name="a470" text:class-names="">steplib</text:span><text:span text:style-name="a471" text:class-names=""><text:s text:c="1"/>notre<text:s text:c="1"/></text:span><text:span text:style-name="a472" text:class-names="">load</text:span><text:span text:style-name="a473" text:class-names=""><text:s text:c="1"/>!</text:span><text:span text:style-name="a474" text:class-names=""/></text:p>
          </draw:text-box>
          <svg:title/>
          <svg:desc/>
        </draw:frame>
      </draw:page>
      <draw:page draw:name="Slide10" draw:style-name="a477" draw:master-page-name="Master1-Layout2-obj-Titre-et-contenu" presentation:presentation-page-layout-name="Master1-PPL2" draw:id="Slide-265">
        <draw:frame draw:id="id74" presentation:style-name="a484" draw:name="Titre 1" svg:x="0.91667in" svg:y="0.39931in" svg:width="11.5in" svg:height="1.44965in" presentation:class="title" presentation:placeholder="false">
          <draw:text-box>
            <text:p text:style-name="a483" text:class-names="" text:cond-style-name=""><text:span text:style-name="a478" text:class-names="">Commande</text:span><text:span text:style-name="a479" text:class-names=""><text:s text:c="1"/></text:span><text:span text:style-name="a480" text:class-names="">su</text:span><text:span text:style-name="a481" text:class-names="">p</text:span><text:span text:style-name="a482" text:class-names=""/></text:p>
          </draw:text-box>
          <svg:title/>
          <svg:desc/>
        </draw:frame>
        <draw:frame draw:id="id75" presentation:style-name="a501" draw:name="Espace réservé du contenu 2" svg:x="0.91667in" svg:y="1.99653in" svg:width="11.5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5" text:class-names="">fermer la session :<text:s text:c="1"/></text:span><text:span text:style-name="a486" text:class-names="">secf</text:span><text:span text:style-name="a487" text:class-names=""><text:s text:c="2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0" text:class-names="">sur la console<text:s text:c="1"/></text:span><text:span text:style-name="a491" text:class-names="">arreter</text:span><text:span text:style-name="a492" text:class-names=""><text:s text:c="1"/>proprement<text:s text:c="1"/></text:span><text:span text:style-name="a493" text:class-names="">cics</text:span><text:span text:style-name="a494" text:class-names=""><text:s text:c="1"/>: f cicsts51,cemt perf<text:s text:c="1"/></text:span><text:span text:style-name="a495" text:class-names="">shut</text:span><text:span text:style-name="a496" text:class-names=""><text:s text:c="1"/></text:span><text:span text:style-name="a497" text:class-names="">immed</text:span><text:span text:style-name="a4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benjamin pallo</meta:initial-creator>
    <dc:creator>benjamin pallo</dc:creator>
    <meta:creation-date>2026-07-10T07:52:10Z</meta:creation-date>
    <dc:date>2026-07-10T10:17:22Z</dc:date>
    <meta:editing-cycles>1</meta:editing-cycles>
    <meta:editing-duration>PT8711S</meta:editing-duration>
    <meta:document-statistic meta:paragraph-count="17" meta:word-count="143"/>
  </office:meta>
</office:document-meta>
</file>